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744in" svg:height="4.7492in" svg:x="3.9748in" svg:y="0.9228in">
            <draw:object draw:notify-on-update-of-ranges="Sheet1.B1:Sheet1.B5 Sheet1.A1:Sheet1.A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665in" svg:height="4.7409in" svg:x="14.3819in" svg:y="2.548in">
            <draw:object draw:notify-on-update-of-ranges="Sheet1.Q1:Sheet1.Q5 Sheet1.R1:Sheet1.R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9413in" svg:height="4.6559in" svg:x="3.2035in" svg:y="8.5673in">
            <draw:object draw:notify-on-update-of-ranges="Sheet1.C50:Sheet1.C54 Sheet1.B50:Sheet1.B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2177in" svg:height="4.8508in" svg:x="16.7047in" svg:y="8.4996in">
            <draw:object draw:notify-on-update-of-ranges="Sheet1.P49:Sheet1.P55 Sheet1.Q49:Sheet1.Q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28.5" calcext:value-type="float">
            <text:p>28.5</text:p>
          </table:table-cell>
          <table:table-cell table:formula="of:=1/[.C1]" office:value-type="float" office:value="0.416666666666667" calcext:value-type="float">
            <text:p>0.416666666666667</text:p>
          </table:table-cell>
          <table:table-cell office:value-type="float" office:value="2.4" calcext:value-type="float">
            <text:p>2.4</text:p>
          </table:table-cell>
          <table:table-cell table:number-columns-repeated="13"/>
          <table:table-cell office:value-type="float" office:value="0.05" calcext:value-type="float">
            <text:p>0.05</text:p>
          </table:table-cell>
          <table:table-cell table:formula="of:=[.S1]^2" office:value-type="float" office:value="4382.44" calcext:value-type="float">
            <text:p>4382.4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table:formula="of:=1/[.C2]" office:value-type="float" office:value="0.833333333333333" calcext:value-type="float">
            <text:p>0.833333333333333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office:value-type="float" office:value="0.1" calcext:value-type="float">
            <text:p>0.1</text:p>
          </table:table-cell>
          <table:table-cell table:formula="of:=[.S2]^2" office:value-type="float" office:value="8742.25" calcext:value-type="float">
            <text:p>8742.25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table:formula="of:=1/[.C3]"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table:number-columns-repeated="13"/>
          <table:table-cell office:value-type="float" office:value="0.15" calcext:value-type="float">
            <text:p>0.15</text:p>
          </table:table-cell>
          <table:table-cell table:formula="of:=[.S3]^2" office:value-type="float" office:value="13064.49" calcext:value-type="float">
            <text:p>13064.49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table:formula="of:=1/[.C4]" office:value-type="float" office:value="1.66666666666667" calcext:value-type="float">
            <text:p>1.66666666666667</text:p>
          </table:table-cell>
          <table:table-cell office:value-type="float" office:value="0.6" calcext:value-type="float">
            <text:p>0.6</text:p>
          </table:table-cell>
          <table:table-cell table:number-columns-repeated="13"/>
          <table:table-cell office:value-type="float" office:value="0.2" calcext:value-type="float">
            <text:p>0.2</text:p>
          </table:table-cell>
          <table:table-cell table:formula="of:=[.S4]^2" office:value-type="float" office:value="17344.89" calcext:value-type="float">
            <text:p>17344.89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table:formula="of:=1/[.C5]" office:value-type="float" office:value="2.08333333333333" calcext:value-type="float">
            <text:p>2.08333333333333</text:p>
          </table:table-cell>
          <table:table-cell office:value-type="float" office:value="0.48" calcext:value-type="float">
            <text:p>0.48</text:p>
          </table:table-cell>
          <table:table-cell table:number-columns-repeated="13"/>
          <table:table-cell office:value-type="float" office:value="0.25" calcext:value-type="float">
            <text:p>0.25</text:p>
          </table:table-cell>
          <table:table-cell table:formula="of:=[.S5]^2" office:value-type="float" office:value="21083.04" calcext:value-type="float">
            <text:p>21083.04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matrix-columns-spanned="2" table:number-matrix-rows-spanned="5" table:formula="of:=LINEST([.A1:.A5];[.B1:.B5]; 1; 1)" office:value-type="float" office:value="68.232" calcext:value-type="float">
            <text:p>68.232</text:p>
          </table:table-cell>
          <table:table-cell office:value-type="float" office:value="0.310000000000002" calcext:value-type="float">
            <text:p>0.310000000000002</text:p>
          </table:table-cell>
          <table:table-cell table:number-columns-repeated="17"/>
        </table:table-row>
        <table:table-row table:style-name="ro1">
          <table:table-cell office:value-type="float" office:value="0.219526763744199" calcext:value-type="float">
            <text:p>0.219526763744199</text:p>
          </table:table-cell>
          <table:table-cell office:value-type="float" office:value="0.303369961158543" calcext:value-type="float">
            <text:p>0.303369961158543</text:p>
          </table:table-cell>
          <table:table-cell table:number-columns-repeated="17"/>
        </table:table-row>
        <table:table-row table:style-name="ro1">
          <table:table-cell office:value-type="float" office:value="0.9999689467889" calcext:value-type="float">
            <text:p>0.9999689467889</text:p>
          </table:table-cell>
          <table:table-cell office:value-type="float" office:value="0.289251908665559" calcext:value-type="float">
            <text:p>0.289251908665559</text:p>
          </table:table-cell>
          <table:table-cell table:number-columns-repeated="17"/>
        </table:table-row>
        <table:table-row table:style-name="ro1">
          <table:table-cell office:value-type="float" office:value="96605.3665338617" calcext:value-type="float">
            <text:p>96605.3665338617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8082.649" calcext:value-type="float">
            <text:p>8082.649</text:p>
          </table:table-cell>
          <table:table-cell office:value-type="float" office:value="0.251000000000007" calcext:value-type="float">
            <text:p>0.251000000000007</text:p>
          </table:table-cell>
          <table:table-cell table:number-columns-repeated="17"/>
        </table:table-row>
        <table:table-row table:style-name="ro1" table:number-rows-repeated="33">
          <table:table-cell table:number-columns-repeated="19"/>
        </table:table-row>
        <table:table-row table:style-name="ro1">
          <table:table-cell table:number-columns-repeated="15"/>
          <table:table-cell office:value-type="float" office:value="0.05" calcext:value-type="float">
            <text:p>0.05</text:p>
          </table:table-cell>
          <table:table-cell table:formula="of:=[.R49]^2" office:value-type="float" office:value="342.25" calcext:value-type="float">
            <text:p>342.25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1/[.D50]" office:value-type="float" office:value="0.416666666666667" calcext:value-type="float">
            <text:p>0.416666666666667</text:p>
          </table:table-cell>
          <table:table-cell office:value-type="float" office:value="2.4" calcext:value-type="float">
            <text:p>2.4</text:p>
          </table:table-cell>
          <table:table-cell table:number-columns-repeated="11"/>
          <table:table-cell office:value-type="float" office:value="0.1" calcext:value-type="float">
            <text:p>0.1</text:p>
          </table:table-cell>
          <table:table-cell table:formula="of:=[.R50]^2" office:value-type="float" office:value="660.49" calcext:value-type="float">
            <text:p>660.49</text:p>
          </table:table-cell>
          <table:table-cell office:value-type="float" office:value="25.7" calcext:value-type="float">
            <text:p>25.7</text:p>
          </table:table-cell>
          <table:table-cell/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1/[.D51]" office:value-type="float" office:value="0.833333333333333" calcext:value-type="float">
            <text:p>0.833333333333333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table:formula="of:=[.R51]^2" office:value-type="float" office:value="1004.89" calcext:value-type="float">
            <text:p>1004.89</text:p>
          </table:table-cell>
          <table:table-cell office:value-type="float" office:value="31.7" calcext:value-type="float">
            <text:p>31.7</text:p>
          </table:table-cell>
          <table:table-cell/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1/[.D52]"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table:number-columns-repeated="11"/>
          <table:table-cell office:value-type="float" office:value="0.2" calcext:value-type="float">
            <text:p>0.2</text:p>
          </table:table-cell>
          <table:table-cell table:formula="of:=[.R52]^2" office:value-type="float" office:value="1369" calcext:value-type="float">
            <text:p>136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31.7" calcext:value-type="float">
            <text:p>31.7</text:p>
          </table:table-cell>
          <table:table-cell table:formula="of:=1/[.D53]" office:value-type="float" office:value="1.66666666666667" calcext:value-type="float">
            <text:p>1.66666666666667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1/[.D54]" office:value-type="float" office:value="2.08333333333333" calcext:value-type="float">
            <text:p>2.08333333333333</text:p>
          </table:table-cell>
          <table:table-cell office:value-type="float" office:value="0.48" calcext:value-type="float">
            <text:p>0.48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5"/>
          <table:table-cell office:value-type="float" office:value="0.25" calcext:value-type="float">
            <text:p>0.25</text:p>
          </table:table-cell>
          <table:table-cell table:formula="of:=[.R58]^2" office:value-type="float" office:value="1747.24" calcext:value-type="float">
            <text:p>1747.24</text:p>
          </table:table-cell>
          <table:table-cell office:value-type="float" office:value="41.8" calcext:value-type="float">
            <text:p>41.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3" calcext:value-type="float">
            <text:p>0.3</text:p>
          </table:table-cell>
          <table:table-cell table:formula="of:=[.R59]^2" office:value-type="float" office:value="2313.61" calcext:value-type="float">
            <text:p>2313.61</text:p>
          </table:table-cell>
          <table:table-cell office:value-type="float" office:value="48.1" calcext:value-type="float">
            <text:p>48.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35" calcext:value-type="float">
            <text:p>0.35</text:p>
          </table:table-cell>
          <table:table-cell table:formula="of:=[.R60]^2" office:value-type="float" office:value="2970.25" calcext:value-type="float">
            <text:p>2970.25</text:p>
          </table:table-cell>
          <table:table-cell office:value-type="float" office:value="54.5" calcext:value-type="float">
            <text:p>5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2:34:36.301449200</meta:creation-date>
    <dc:date>2025-08-29T22:46:27.377413100</dc:date>
    <meta:editing-duration>PT7H9M57S</meta:editing-duration>
    <meta:editing-cycles>4</meta:editing-cycles>
    <meta:generator>LibreOffice/25.2.5.2$Windows_X86_64 LibreOffice_project/03d19516eb2e1dd5d4ccd751a0d6f35f35e08022</meta:generator>
    <meta:document-statistic meta:table-count="1" meta:cell-count="7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2" chart:regression-type="linear"/>
      <style:graphic-properties svg:stroke-width="0.05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002cm" svg:height="12.064cm" xlink:href=".." xlink:type="simple" chart:class="chart:scatter" chart:style-name="ch1">
        <chart:title svg:x="6.796cm" svg:y="0.377cm" chart:style-name="ch2">
          <text:p> (1/λ)תדירות  המחולל כתלות ב</text:p>
        </chart:title>
        <chart:plot-area chart:style-name="ch3" svg:x="1.401cm" svg:y="1.445cm" svg:width="18.201cm" svg:height="9.407cm">
          <chart:coordinate-region svg:x="2.252cm" svg:y="1.647cm" svg:width="17.098cm" svg:height="8.552cm"/>
          <chart:axis chart:dimension="x" chart:name="primary-x" chart:style-name="ch4">
            <chart:title svg:x="9.729cm" svg:y="11.093cm" chart:style-name="ch2">
              <text:p><text:span text:style-name="T1">(1/λ) [1/m]</text:span></text:p>
            </chart:title>
          </chart:axis>
          <chart:axis chart:dimension="y" chart:name="primary-y" chart:style-name="ch5">
            <chart:title svg:x="0.451cm" svg:y="6.576cm" chart:style-name="ch6">
              <text:p><text:span text:style-name="T1">f [Hz]</text:span></text:p>
            </chart:title>
            <chart:grid chart:style-name="ch7" chart:class="major"/>
          </chart:axis>
          <chart:series chart:style-name="ch8" chart:values-cell-range-address="Sheet1.A1:Sheet1.A5" chart:class="chart:scatter">
            <chart:domain table:cell-range-address="Sheet1.B1:Sheet1.B5"/>
            <chart:regression-curve chart:style-name="ch9">
              <chart:equation chart:display-equation="true" chart:display-r-square="true" svg:x="2.466cm" svg:y="1.761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6666666666667">
                <text:p>0.416666666666667</text:p>
                <draw:g>
                  <svg:desc>Sheet1.B1:Sheet1.B5</svg:desc>
                </draw:g>
              </table:table-cell>
              <table:table-cell office:value-type="float" office:value="28.5">
                <text:p>28.5</text:p>
                <draw:g>
                  <svg:desc>Sheet1.A1:Sheet1.A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42.2">
                <text:p>14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00" loext:regression-extrapolate-backward="200" chart:regression-type="linear"/>
      <style:graphic-properties svg:stroke-width="0.05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20.236cm" svg:height="12.043cm" xlink:href=".." xlink:type="simple" chart:class="chart:scatter" chart:style-name="ch1">
        <chart:plot-area chart:style-name="ch2" svg:x="1.575cm" svg:y="0.24cm" svg:width="18.257cm" svg:height="10.422cm">
          <chart:coordinate-region svg:x="2.827cm" svg:y="0.442cm" svg:width="16.753cm" svg:height="9.567cm"/>
          <chart:axis chart:dimension="x" chart:name="primary-x" chart:style-name="ch3">
            <chart:title svg:x="9.721cm" svg:y="10.902cm" chart:style-name="ch4">
              <text:p><text:span text:style-name="T1">mass [kg]</text:span></text:p>
            </chart:title>
          </chart:axis>
          <chart:axis chart:dimension="y" chart:name="primary-y" chart:style-name="ch5">
            <chart:title svg:x="0.451cm" svg:y="6.455cm" chart:style-name="ch6">
              <text:p><text:span text:style-name="T1">f^2 [Hz^2]</text:span></text:p>
            </chart:title>
            <chart:grid chart:style-name="ch7" chart:class="major"/>
          </chart:axis>
          <chart:series chart:style-name="ch8" chart:values-cell-range-address="Sheet1.R1:Sheet1.R5" chart:class="chart:scatter">
            <chart:domain table:cell-range-address="Sheet1.Q1:Sheet1.Q5"/>
            <chart:regression-curve chart:style-name="ch9">
              <chart:equation chart:display-equation="true" chart:display-r-square="true" svg:x="3.699cm" svg:y="0.891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Q1:Sheet1.Q5</svg:desc>
                </draw:g>
              </table:table-cell>
              <table:table-cell office:value-type="float" office:value="4382.44">
                <text:p>4382.44</text:p>
                <draw:g>
                  <svg:desc>Sheet1.R1:Sheet1.R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742.25">
                <text:p>874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13064.49">
                <text:p>13064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7344.89">
                <text:p>17344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1083.04">
                <text:p>21083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" chart:regression-type="linear"/>
      <style:graphic-properties svg:stroke-width="0.05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172cm" svg:height="11.827cm" xlink:href=".." xlink:type="simple" chart:class="chart:scatter" chart:style-name="ch1">
        <chart:title svg:x="6.955cm" svg:y="0.372cm" chart:style-name="ch2">
          <text:p>(1/λ) תדירות המחולל כתלות ב</text:p>
        </chart:title>
        <chart:plot-area chart:style-name="ch3" svg:x="1.404cm" svg:y="1.435cm" svg:width="18.365cm" svg:height="9.185cm">
          <chart:coordinate-region svg:x="2.055cm" svg:y="1.637cm" svg:width="17.462cm" svg:height="8.33cm"/>
          <chart:axis chart:dimension="x" chart:name="primary-x" chart:style-name="ch4">
            <chart:title svg:x="9.814cm" svg:y="10.856cm" chart:style-name="ch2">
              <text:p><text:span text:style-name="T1">(1/λ) [1/m]</text:span></text:p>
            </chart:title>
          </chart:axis>
          <chart:axis chart:dimension="y" chart:name="primary-y" chart:style-name="ch5">
            <chart:title svg:x="0.451cm" svg:y="6.455cm" chart:style-name="ch6">
              <text:p><text:span text:style-name="T1">f [Hz]</text:span></text:p>
            </chart:title>
            <chart:grid chart:style-name="ch7" chart:class="major"/>
          </chart:axis>
          <chart:series chart:style-name="ch8" chart:values-cell-range-address="Sheet1.B50:Sheet1.B54" chart:class="chart:scatter">
            <chart:domain table:cell-range-address="Sheet1.C50:Sheet1.C54"/>
            <chart:regression-curve chart:style-name="ch9">
              <chart:equation chart:display-equation="true" chart:display-r-square="true" svg:x="2.416cm" svg:y="1.644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6666666666667">
                <text:p>0.416666666666667</text:p>
                <draw:g>
                  <svg:desc>Sheet1.C50:Sheet1.C54</svg:desc>
                </draw:g>
              </table:table-cell>
              <table:table-cell office:value-type="float" office:value="7.8">
                <text:p>7.8</text:p>
                <draw:g>
                  <svg:desc>Sheet1.B50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39.6">
                <text:p>39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000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20.874cm" svg:height="12.322cm" xlink:href=".." xlink:type="simple" chart:class="chart:scatter" chart:style-name="ch1">
        <chart:plot-area chart:style-name="ch2" svg:x="1.588cm" svg:y="0.246cm" svg:width="18.869cm" svg:height="10.689cm">
          <chart:coordinate-region svg:x="2.639cm" svg:y="0.448cm" svg:width="17.467cm" svg:height="9.834cm"/>
          <chart:axis chart:dimension="x" chart:name="primary-x" chart:style-name="ch3">
            <chart:title svg:x="9.981cm" svg:y="11.181cm" chart:style-name="ch4">
              <text:p><text:span text:style-name="T1">mass  [kg]</text:span></text:p>
            </chart:title>
          </chart:axis>
          <chart:axis chart:dimension="y" chart:name="primary-y" chart:style-name="ch5">
            <chart:title svg:x="0.451cm" svg:y="6.594cm" chart:style-name="ch6">
              <text:p><text:span text:style-name="T1">f^2 [Hz^2]</text:span></text:p>
            </chart:title>
            <chart:grid chart:style-name="ch7" chart:class="major"/>
          </chart:axis>
          <chart:series chart:style-name="ch8" chart:values-cell-range-address="Sheet1.Q49:Sheet1.Q55" chart:class="chart:scatter">
            <chart:domain table:cell-range-address="Sheet1.P49:Sheet1.P55"/>
            <chart:regression-curve chart:style-name="ch9">
              <chart:equation chart:display-equation="true" chart:display-r-square="true" svg:x="3.082cm" svg:y="1.97cm"/>
            </chart:regression-curve>
            <chart:data-point chart:repeated="3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P49:Sheet1.P55</svg:desc>
                </draw:g>
              </table:table-cell>
              <table:table-cell office:value-type="float" office:value="342.25">
                <text:p>342.25</text:p>
                <draw:g>
                  <svg:desc>Sheet1.Q49:Sheet1.Q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60.49">
                <text:p>66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1004.89">
                <text:p>1004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