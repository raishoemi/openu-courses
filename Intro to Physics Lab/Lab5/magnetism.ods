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02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5827in"/>
    </style:style>
    <style:style style:name="co5" style:family="table-column">
      <style:table-column-properties fo:break-before="auto" style:column-width="1.4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2.0634in" loext:decorative="false"/>
      <style:paragraph-properties style:writing-mode="lr-tb"/>
    </style:style>
    <style:style style:name="gr3" style:family="graphic" style:parent-style-name="Default">
      <style:graphic-properties draw:stroke="none" svg:stroke-color="#000000" draw:fill="none" draw:fill-color="#ffffff" fo:min-height="1.6508in" loext:decorative="false"/>
      <style:paragraph-properties style:writing-mode="lr-tb"/>
    </style:style>
    <style:style style:name="gr4" style:family="graphic" style:parent-style-name="Default">
      <style:graphic-properties draw:stroke="none" svg:stroke-color="#000000" draw:fill="none" draw:fill-color="#ffffff" fo:min-height="0.872in" loext:decorative="false"/>
      <style:paragraph-properties style:writing-mode="lr-tb"/>
    </style:style>
    <style:style style:name="gr5" style:family="graphic" style:parent-style-name="Default">
      <style:graphic-properties draw:stroke="none" svg:stroke-color="#000000" draw:fill="none" draw:fill-color="#ffffff" fo:min-height="2.2094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4969in" svg:height="5.1894in" svg:x="0.6543in" svg:y="2.6921in">
            <draw:object draw:notify-on-update-of-ranges="Sheet1.I1:Sheet1.I12 Sheet1.D1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ext Frame 1" draw:style-name="gr2" draw:text-style-name="P2" svg:width="2.9689in" svg:height="2.0634in" svg:x="1.5646in" svg:y="3.1323in">
            <draw:text-box>
              <text:p>m (slope) = 0.2565 ± 0.002</text:p>
              <text:p>b (y-intercept) = <text:s/>-6.54E-05 ± 9.74E-05 <text:s text:c="3"/>R2 = 0.9994zz</text:p>
            </draw:text-box>
          </draw:frame>
          <draw:frame draw:z-index="2" draw:style-name="gr1" draw:text-style-name="P1" svg:width="8.8157in" svg:height="5.1134in" svg:x="12.7575in" svg:y="2.4634in">
            <draw:object draw:notify-on-update-of-ranges="Sheet1.R1:Sheet1.R8 Sheet1.T1:Sheet1.T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Text Frame 2" draw:style-name="gr3" draw:text-style-name="P2" svg:width="3.1169in" svg:height="1.6508in" svg:x="14.0193in" svg:y="3.3772in">
            <draw:text-box>
              <text:p>m (slope) = 0.00612 ± 0.000112</text:p>
              <text:p>b (y-intercept) = <text:s/>2.271E-05 ± 8.15E-05</text:p>
              <text:p>R2 = 0.999881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3" calcext:value-type="float">
            <text:p>0.3</text:p>
          </table:table-cell>
          <table:table-cell table:formula="of:=[.A1] * 9.81 * 10^(-3)" office:value-type="float" office:value="-0.0031392" calcext:value-type="float">
            <text:p>-0.0031392</text:p>
          </table:table-cell>
          <table:table-cell table:formula="of:=[.B1] * 9.81 * 10^(-3)" office:value-type="float" office:value="0.002943" calcext:value-type="float">
            <text:p>0.002943</text:p>
          </table:table-cell>
          <table:table-cell table:formula="of:=[.C1] * 10^3" office:value-type="float" office:value="-3.1392" calcext:value-type="float">
            <text:p>-3.1392</text:p>
          </table:table-cell>
          <table:table-cell table:formula="of:=[.D1] * 10^3" office:value-type="float" office:value="2.943" calcext:value-type="float">
            <text:p>2.943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[.H1]/100" office:value-type="float" office:value="0.012" calcext:value-type="float">
            <text:p>0.012</text:p>
          </table:table-cell>
          <table:table-cell table:formula="of:=[.I1]*-1" office:value-type="float" office:value="-0.012" calcext:value-type="float">
            <text:p>-0.012</text:p>
          </table:table-cell>
          <table:table-cell table:number-columns-repeated="7"/>
          <table:table-cell office:value-type="float" office:value="1.07" calcext:value-type="float">
            <text:p>1.07</text:p>
          </table:table-cell>
          <table:table-cell office:value-type="float" office:value="0.67" calcext:value-type="float">
            <text:p>0.67</text:p>
          </table:table-cell>
          <table:table-cell table:formula="of:=[.S1] * 9.81 * 10^(-3)" office:value-type="float" office:value="0.0065727" calcext:value-type="float">
            <text:p>0.0065727</text:p>
          </table:table-cell>
          <table:table-cell table:formula="of:=[.T1] * 10^3" office:value-type="float" office:value="6.5727" calcext:value-type="float">
            <text:p>6.5727</text:p>
          </table:table-cell>
          <table:table-cell table:number-columns-repeated="6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59" calcext:value-type="float">
            <text:p>0.59</text:p>
          </table:table-cell>
          <table:table-cell table:formula="of:=[.A2] * 9.81 * 10^(-3)" office:value-type="float" office:value="-0.005886" calcext:value-type="float">
            <text:p>-0.005886</text:p>
          </table:table-cell>
          <table:table-cell table:formula="of:=[.B2] * 9.81 * 10^(-3)" office:value-type="float" office:value="0.0057879" calcext:value-type="float">
            <text:p>0.0057879</text:p>
          </table:table-cell>
          <table:table-cell table:formula="of:=[.C2] * 10^3" office:value-type="float" office:value="-5.886" calcext:value-type="float">
            <text:p>-5.886</text:p>
          </table:table-cell>
          <table:table-cell table:formula="of:=[.D2] * 10^3" office:value-type="float" office:value="5.7879" calcext:value-type="float">
            <text:p>5.7879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H2]/100" office:value-type="float" office:value="0.022" calcext:value-type="float">
            <text:p>0.022</text:p>
          </table:table-cell>
          <table:table-cell table:formula="of:=[.I2]*-1" office:value-type="float" office:value="-0.022" calcext:value-type="float">
            <text:p>-0.022</text:p>
          </table:table-cell>
          <table:table-cell table:number-columns-repeated="7"/>
          <table:table-cell office:value-type="float" office:value="1.61" calcext:value-type="float">
            <text:p>1.61</text:p>
          </table:table-cell>
          <table:table-cell office:value-type="float" office:value="1.01" calcext:value-type="float">
            <text:p>1.01</text:p>
          </table:table-cell>
          <table:table-cell table:formula="of:=[.S2] * 9.81 * 10^(-3)" office:value-type="float" office:value="0.0099081" calcext:value-type="float">
            <text:p>0.0099081</text:p>
          </table:table-cell>
          <table:table-cell table:formula="of:=[.T2] * 10^3" office:value-type="float" office:value="9.9081" calcext:value-type="float">
            <text:p>9.9081</text:p>
          </table:table-cell>
          <table:table-cell table:number-columns-repeated="6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87" calcext:value-type="float">
            <text:p>0.87</text:p>
          </table:table-cell>
          <table:table-cell table:formula="of:=[.A3] * 9.81 * 10^(-3)" office:value-type="float" office:value="-0.0086328" calcext:value-type="float">
            <text:p>-0.0086328</text:p>
          </table:table-cell>
          <table:table-cell table:formula="of:=[.B3] * 9.81 * 10^(-3)" office:value-type="float" office:value="0.0085347" calcext:value-type="float">
            <text:p>0.0085347</text:p>
          </table:table-cell>
          <table:table-cell table:formula="of:=[.C3] * 10^3" office:value-type="float" office:value="-8.6328" calcext:value-type="float">
            <text:p>-8.6328</text:p>
          </table:table-cell>
          <table:table-cell table:formula="of:=[.D3] * 10^3" office:value-type="float" office:value="8.5347" calcext:value-type="float">
            <text:p>8.5347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[.H3]/100" office:value-type="float" office:value="0.032" calcext:value-type="float">
            <text:p>0.032</text:p>
          </table:table-cell>
          <table:table-cell table:formula="of:=[.I3]*-1" office:value-type="float" office:value="-0.032" calcext:value-type="float">
            <text:p>-0.03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1" office:value-type="float" office:value="1.26" calcext:value-type="float">
            <text:p>1.26</text:p>
          </table:table-cell>
          <table:table-cell table:formula="of:=[.S3] * 9.81 * 10^(-3)" office:value-type="float" office:value="0.0123606" calcext:value-type="float">
            <text:p>0.0123606</text:p>
          </table:table-cell>
          <table:table-cell table:formula="of:=[.T3] * 10^3" office:value-type="float" office:value="12.3606" calcext:value-type="float">
            <text:p>12.3606</text:p>
          </table:table-cell>
          <table:table-cell table:number-columns-repeated="6"/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float" office:value="1.14" calcext:value-type="float">
            <text:p>1.14</text:p>
          </table:table-cell>
          <table:table-cell table:formula="of:=[.A4] * 9.81 * 10^(-3)" office:value-type="float" office:value="-0.0113796" calcext:value-type="float">
            <text:p>-0.0113796</text:p>
          </table:table-cell>
          <table:table-cell table:formula="of:=[.B4] * 9.81 * 10^(-3)" office:value-type="float" office:value="0.0111834" calcext:value-type="float">
            <text:p>0.0111834</text:p>
          </table:table-cell>
          <table:table-cell table:formula="of:=[.C4] * 10^3" office:value-type="float" office:value="-11.3796" calcext:value-type="float">
            <text:p>-11.3796</text:p>
          </table:table-cell>
          <table:table-cell table:formula="of:=[.D4] * 10^3" office:value-type="float" office:value="11.1834" calcext:value-type="float">
            <text:p>11.1834</text:p>
          </table:table-cell>
          <table:table-cell/>
          <table:table-cell office:value-type="float" office:value="4.2" calcext:value-type="float">
            <text:p>4.2</text:p>
          </table:table-cell>
          <table:table-cell table:formula="of:=[.H4]/100" office:value-type="float" office:value="0.042" calcext:value-type="float">
            <text:p>0.042</text:p>
          </table:table-cell>
          <table:table-cell table:formula="of:=[.I4]*-1" office:value-type="float" office:value="-0.042" calcext:value-type="float">
            <text:p>-0.042</text:p>
          </table:table-cell>
          <table:table-cell table:number-columns-repeated="7"/>
          <table:table-cell office:value-type="float" office:value="2.53" calcext:value-type="float">
            <text:p>2.53</text:p>
          </table:table-cell>
          <table:table-cell office:value-type="float" office:value="1.6" calcext:value-type="float">
            <text:p>1.6</text:p>
          </table:table-cell>
          <table:table-cell table:formula="of:=[.S4] * 9.81 * 10^(-3)" office:value-type="float" office:value="0.015696" calcext:value-type="float">
            <text:p>0.015696</text:p>
          </table:table-cell>
          <table:table-cell table:formula="of:=[.T4] * 10^3" office:value-type="float" office:value="15.696" calcext:value-type="float">
            <text:p>15.696</text:p>
          </table:table-cell>
          <table:table-cell table:number-columns-repeated="6"/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float" office:value="1.65" calcext:value-type="float">
            <text:p>1.65</text:p>
          </table:table-cell>
          <table:table-cell table:formula="of:=[.A5] * 9.81 * 10^(-3)" office:value-type="float" office:value="-0.0162846" calcext:value-type="float">
            <text:p>-0.0162846</text:p>
          </table:table-cell>
          <table:table-cell table:formula="of:=[.B5] * 9.81 * 10^(-3)" office:value-type="float" office:value="0.0161865" calcext:value-type="float">
            <text:p>0.0161865</text:p>
          </table:table-cell>
          <table:table-cell table:formula="of:=[.C5] * 10^3" office:value-type="float" office:value="-16.2846" calcext:value-type="float">
            <text:p>-16.2846</text:p>
          </table:table-cell>
          <table:table-cell table:formula="of:=[.D5] * 10^3" office:value-type="float" office:value="16.1865" calcext:value-type="float">
            <text:p>16.1865</text:p>
          </table:table-cell>
          <table:table-cell/>
          <table:table-cell office:value-type="float" office:value="6.4" calcext:value-type="float">
            <text:p>6.4</text:p>
          </table:table-cell>
          <table:table-cell table:formula="of:=[.H5]/100" office:value-type="float" office:value="0.064" calcext:value-type="float">
            <text:p>0.064</text:p>
          </table:table-cell>
          <table:table-cell table:formula="of:=[.I5]*-1" office:value-type="float" office:value="-0.064" calcext:value-type="float">
            <text:p>-0.064</text:p>
          </table:table-cell>
          <table:table-cell table:number-columns-repeated="7"/>
          <table:table-cell office:value-type="float" office:value="3.11" calcext:value-type="float">
            <text:p>3.11</text:p>
          </table:table-cell>
          <table:table-cell office:value-type="float" office:value="1.96" calcext:value-type="float">
            <text:p>1.96</text:p>
          </table:table-cell>
          <table:table-cell table:formula="of:=[.S5] * 9.81 * 10^(-3)" office:value-type="float" office:value="0.0192276" calcext:value-type="float">
            <text:p>0.0192276</text:p>
          </table:table-cell>
          <table:table-cell table:formula="of:=[.T5] * 10^3" office:value-type="float" office:value="19.2276" calcext:value-type="float">
            <text:p>19.2276</text:p>
          </table:table-cell>
          <table:table-cell table:number-columns-repeated="6"/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float" office:value="2.16" calcext:value-type="float">
            <text:p>2.16</text:p>
          </table:table-cell>
          <table:table-cell table:formula="of:=[.A6] * 9.81 * 10^(-3)" office:value-type="float" office:value="-0.0212877" calcext:value-type="float">
            <text:p>-0.0212877</text:p>
          </table:table-cell>
          <table:table-cell table:formula="of:=[.B6] * 9.81 * 10^(-3)" office:value-type="float" office:value="0.0211896" calcext:value-type="float">
            <text:p>0.0211896</text:p>
          </table:table-cell>
          <table:table-cell table:formula="of:=[.C6] * 10^3" office:value-type="float" office:value="-21.2877" calcext:value-type="float">
            <text:p>-21.2877</text:p>
          </table:table-cell>
          <table:table-cell table:formula="of:=[.D6] * 10^3" office:value-type="float" office:value="21.1896" calcext:value-type="float">
            <text:p>21.1896</text:p>
          </table:table-cell>
          <table:table-cell/>
          <table:table-cell office:value-type="float" office:value="8.4" calcext:value-type="float">
            <text:p>8.4</text:p>
          </table:table-cell>
          <table:table-cell table:formula="of:=[.H6]/100" office:value-type="float" office:value="0.084" calcext:value-type="float">
            <text:p>0.084</text:p>
          </table:table-cell>
          <table:table-cell table:formula="of:=[.I6]*-1" office:value-type="float" office:value="-0.084" calcext:value-type="float">
            <text:p>-0.084</text:p>
          </table:table-cell>
          <table:table-cell table:number-columns-repeated="7"/>
          <table:table-cell office:value-type="float" office:value="3.53" calcext:value-type="float">
            <text:p>3.53</text:p>
          </table:table-cell>
          <table:table-cell office:value-type="float" office:value="2.21" calcext:value-type="float">
            <text:p>2.21</text:p>
          </table:table-cell>
          <table:table-cell table:formula="of:=[.S6] * 9.81 * 10^(-3)" office:value-type="float" office:value="0.0216801" calcext:value-type="float">
            <text:p>0.0216801</text:p>
          </table:table-cell>
          <table:table-cell table:formula="of:=[.T6] * 10^3" office:value-type="float" office:value="21.6801" calcext:value-type="float">
            <text:p>21.68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031392" calcext:value-type="float">
            <text:p>-0.0031392</text:p>
          </table:table-cell>
          <table:table-cell table:number-columns-repeated="4"/>
          <table:table-cell office:value-type="float" office:value="-0.012" calcext:value-type="float">
            <text:p>-0.012</text:p>
          </table:table-cell>
          <table:table-cell table:number-columns-repeated="8"/>
          <table:table-cell office:value-type="float" office:value="3.96" calcext:value-type="float">
            <text:p>3.96</text:p>
          </table:table-cell>
          <table:table-cell office:value-type="float" office:value="2.47" calcext:value-type="float">
            <text:p>2.47</text:p>
          </table:table-cell>
          <table:table-cell table:formula="of:=[.S7] * 9.81 * 10^(-3)" office:value-type="float" office:value="0.0242307" calcext:value-type="float">
            <text:p>0.0242307</text:p>
          </table:table-cell>
          <table:table-cell table:formula="of:=[.T7] * 10^3" office:value-type="float" office:value="24.2307" calcext:value-type="float">
            <text:p>24.23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05886" calcext:value-type="float">
            <text:p>-0.005886</text:p>
          </table:table-cell>
          <table:table-cell table:number-columns-repeated="4"/>
          <table:table-cell office:value-type="float" office:value="-0.022" calcext:value-type="float">
            <text:p>-0.022</text:p>
          </table:table-cell>
          <table:table-cell table:number-columns-repeated="8"/>
          <table:table-cell office:value-type="float" office:value="4.45" calcext:value-type="float">
            <text:p>4.45</text:p>
          </table:table-cell>
          <table:table-cell office:value-type="float" office:value="2.78" calcext:value-type="float">
            <text:p>2.78</text:p>
          </table:table-cell>
          <table:table-cell table:formula="of:=[.S8] * 9.81 * 10^(-3)" office:value-type="float" office:value="0.0272718" calcext:value-type="float">
            <text:p>0.0272718</text:p>
          </table:table-cell>
          <table:table-cell table:formula="of:=[.T8] * 10^3" office:value-type="float" office:value="27.2718" calcext:value-type="float">
            <text:p>27.27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086328" calcext:value-type="float">
            <text:p>-0.0086328</text:p>
          </table:table-cell>
          <table:table-cell table:number-columns-repeated="4"/>
          <table:table-cell office:value-type="float" office:value="-0.032" calcext:value-type="float">
            <text:p>-0.03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-0.0113796" calcext:value-type="float">
            <text:p>-0.0113796</text:p>
          </table:table-cell>
          <table:table-cell table:number-columns-repeated="4"/>
          <table:table-cell office:value-type="float" office:value="-0.042" calcext:value-type="float">
            <text:p>-0.04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-0.0162846" calcext:value-type="float">
            <text:p>-0.0162846</text:p>
          </table:table-cell>
          <table:table-cell table:number-columns-repeated="4"/>
          <table:table-cell office:value-type="float" office:value="-0.064" calcext:value-type="float">
            <text:p>-0.06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-0.0212877" calcext:value-type="float">
            <text:p>-0.0212877</text:p>
          </table:table-cell>
          <table:table-cell table:number-columns-repeated="4"/>
          <table:table-cell office:value-type="float" office:value="-0.084" calcext:value-type="float">
            <text:p>-0.084</text:p>
          </table:table-cell>
          <table:table-cell table:number-columns-repeated="18"/>
        </table:table-row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11"/>
          <table:table-cell table:number-matrix-columns-spanned="2" table:number-matrix-rows-spanned="5" table:formula="of:=LINEST([.D1:.D12];[.I1:.I12]; 1; 1)" office:value-type="float" office:value="0.256488941515651" calcext:value-type="float">
            <text:p>0.256488941515651</text:p>
          </table:table-cell>
          <table:table-cell office:value-type="float" office:value="-0.0000653999999999999" calcext:value-type="float">
            <text:p>-0.0000653999999999999</text:p>
          </table:table-cell>
          <table:table-cell table:number-columns-repeated="12"/>
          <table:table-cell table:number-matrix-columns-spanned="2" table:number-matrix-rows-spanned="5" table:formula="of:=LINEST([.T1:.T8]; [.R1:.R8]; 1; 1)" office:value-type="float" office:value="0.00611231889003774" calcext:value-type="float">
            <text:p>0.00611231889003774</text:p>
          </table:table-cell>
          <table:table-cell office:value-type="float" office:value="0.000110922688469982" calcext:value-type="float">
            <text:p>0.000110922688469982</text:p>
          </table:table-cell>
        </table:table-row>
        <table:table-row table:style-name="ro1">
          <table:table-cell table:number-columns-repeated="11"/>
          <table:table-cell office:value-type="float" office:value="0.00197626435536693" calcext:value-type="float">
            <text:p>0.00197626435536693</text:p>
          </table:table-cell>
          <table:table-cell office:value-type="float" office:value="0.0000973799122405105" calcext:value-type="float">
            <text:p>9.73799122405105E-05</text:p>
          </table:table-cell>
          <table:table-cell table:number-columns-repeated="12"/>
          <table:table-cell office:value-type="float" office:value="0.0000272144995892509" calcext:value-type="float">
            <text:p>2.72144995892509E-05</text:p>
          </table:table-cell>
          <table:table-cell office:value-type="float" office:value="0.0000815044730569177" calcext:value-type="float">
            <text:p>8.15044730569177E-05</text:p>
          </table:table-cell>
        </table:table-row>
        <table:table-row table:style-name="ro1">
          <table:table-cell table:number-columns-repeated="11"/>
          <table:table-cell office:value-type="float" office:value="0.999406671747032" calcext:value-type="float">
            <text:p>0.999406671747032</text:p>
          </table:table-cell>
          <table:table-cell office:value-type="float" office:value="0.000337333911274325" calcext:value-type="float">
            <text:p>0.000337333911274325</text:p>
          </table:table-cell>
          <table:table-cell table:number-columns-repeated="12"/>
          <table:table-cell office:value-type="float" office:value="0.999881070855432" calcext:value-type="float">
            <text:p>0.999881070855432</text:p>
          </table:table-cell>
          <table:table-cell office:value-type="float" office:value="0.0000852667666274754" calcext:value-type="float">
            <text:p>8.52667666274754E-05</text:p>
          </table:table-cell>
        </table:table-row>
        <table:table-row table:style-name="ro1">
          <table:table-cell table:number-columns-repeated="11"/>
          <table:table-cell office:value-type="float" office:value="16844.0768958371" calcext:value-type="float">
            <text:p>16844.0768958371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0444.2073213757" calcext:value-type="float">
            <text:p>50444.20732137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  <table:table-cell office:value-type="float" office:value="0.00191675771096304" calcext:value-type="float">
            <text:p>0.00191675771096304</text:p>
          </table:table-cell>
          <table:table-cell office:value-type="float" office:value="0.00000113794167695634" calcext:value-type="float">
            <text:p>1.13794167695634E-06</text:p>
          </table:table-cell>
          <table:table-cell table:number-columns-repeated="12"/>
          <table:table-cell office:value-type="float" office:value="0.000366750649011053" calcext:value-type="float">
            <text:p>0.000366750649011053</text:p>
          </table:table-cell>
          <table:table-cell office:value-type="float" office:value="0.0000000436225289466261" calcext:value-type="float">
            <text:p>4.36225289466261E-08</text:p>
          </table:table-cell>
        </table:table-row>
      </table:table>
      <table:table table:name="Sheet2" table:style-name="ta1">
        <table:shapes>
          <draw:frame draw:z-index="0" draw:style-name="gr1" draw:text-style-name="P1" svg:width="8.7535in" svg:height="5.3417in" svg:x="0.5535in" svg:y="2.548in">
            <draw:object draw:notify-on-update-of-ranges="Sheet2.B1:Sheet2.B11 Sheet2.C1:Sheet2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Text Frame 3" draw:style-name="gr4" draw:text-style-name="P2" svg:width="2.826in" svg:height="0.872in" svg:x="1.3563in" svg:y="2.8362in">
            <draw:text-box>
              <text:p>m (slope) = 0.677351 ± 0.00727<text:line-break/>b (y-intercept) = 0.032 ± 0.011<text:line-break/>R^2 = <text:s/>0.99896</text:p>
              <text:p/>
            </draw:text-box>
          </draw:frame>
          <draw:frame draw:z-index="2" draw:style-name="gr1" draw:text-style-name="P1" svg:width="10.0031in" svg:height="5.198in" svg:x="11.1437in" svg:y="2.6157in">
            <draw:object draw:notify-on-update-of-ranges="Sheet2.P1:Sheet2.P11 Sheet2.Q1:Sheet2.Q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Text Frame 4" draw:style-name="gr5" draw:text-style-name="P2" svg:width="3.5469in" svg:height="2.2094in" svg:x="12.1075in" svg:y="2.9543in">
            <draw:text-box>
              <text:p>m (slope) = 3.71543 ± 0.0518<text:line-break/>b (y-intercept) = -0.0033 ± 0.014<text:line-break/>R^2 = <text:s/>0.99824</text:p>
              <text:p/>
            </draw:text-box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8" table:default-cell-style-name="Default"/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.65" calcext:value-type="float">
            <text:p>-2.65</text:p>
          </table:table-cell>
          <table:table-cell table:formula="of:=TAN(RADIANS([.A1]))" office:value-type="float" office:value="-1.73205080756888" calcext:value-type="float">
            <text:p>-1.73205080756888</text:p>
          </table:table-cell>
          <table:table-cell table:number-columns-repeated="12"/>
          <table:table-cell office:value-type="float" office:value="-0.47" calcext:value-type="float">
            <text:p>-0.47</text:p>
          </table:table-cell>
          <table:table-cell office:value-type="float" office:value="-1.73205080756888" calcext:value-type="float">
            <text:p>-1.73205080756888</text:p>
          </table:table-cell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84" calcext:value-type="float">
            <text:p>-1.84</text:p>
          </table:table-cell>
          <table:table-cell table:formula="of:=TAN(RADIANS([.A2]))" office:value-type="float" office:value="-1.19175359259421" calcext:value-type="float">
            <text:p>-1.19175359259421</text:p>
          </table:table-cell>
          <table:table-cell table:number-columns-repeated="12"/>
          <table:table-cell office:value-type="float" office:value="-0.33" calcext:value-type="float">
            <text:p>-0.33</text:p>
          </table:table-cell>
          <table:table-cell office:value-type="float" office:value="-1.19175359259421" calcext:value-type="float">
            <text:p>-1.19175359259421</text:p>
          </table:table-cell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27" calcext:value-type="float">
            <text:p>-1.27</text:p>
          </table:table-cell>
          <table:table-cell table:formula="of:=TAN(RADIANS([.A3]))" office:value-type="float" office:value="-0.83909963117728" calcext:value-type="float">
            <text:p>-0.83909963117728</text:p>
          </table:table-cell>
          <table:table-cell table:number-columns-repeated="2"/>
          <table:table-cell table:number-matrix-columns-spanned="2" table:number-matrix-rows-spanned="5" table:formula="of:=LINEST([.C1:.C11];[.B1:.B11]; 1; 1)" office:value-type="float" office:value="0.677350928550482" calcext:value-type="float">
            <text:p>0.677350928550482</text:p>
          </table:table-cell>
          <table:table-cell office:value-type="float" office:value="0.0320202257132955" calcext:value-type="float">
            <text:p>0.0320202257132955</text:p>
          </table:table-cell>
          <table:table-cell table:number-columns-repeated="8"/>
          <table:table-cell office:value-type="float" office:value="-0.21" calcext:value-type="float">
            <text:p>-0.21</text:p>
          </table:table-cell>
          <table:table-cell office:value-type="float" office:value="-0.83909963117728" calcext:value-type="float">
            <text:p>-0.83909963117728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88" calcext:value-type="float">
            <text:p>-0.88</text:p>
          </table:table-cell>
          <table:table-cell table:formula="of:=TAN(RADIANS([.A4]))" office:value-type="float" office:value="-0.577350269189626" calcext:value-type="float">
            <text:p>-0.577350269189626</text:p>
          </table:table-cell>
          <table:table-cell table:number-columns-repeated="2"/>
          <table:table-cell office:value-type="float" office:value="0.00726773150691566" calcext:value-type="float">
            <text:p>0.00726773150691566</text:p>
          </table:table-cell>
          <table:table-cell office:value-type="float" office:value="0.0108170962209951" calcext:value-type="float">
            <text:p>0.0108170962209951</text:p>
          </table:table-cell>
          <table:table-cell table:number-columns-repeated="8"/>
          <table:table-cell office:value-type="float" office:value="-0.14" calcext:value-type="float">
            <text:p>-0.14</text:p>
          </table:table-cell>
          <table:table-cell office:value-type="float" office:value="-0.577350269189626" calcext:value-type="float">
            <text:p>-0.577350269189626</text:p>
          </table:table-cell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56" calcext:value-type="float">
            <text:p>-0.56</text:p>
          </table:table-cell>
          <table:table-cell table:formula="of:=TAN(RADIANS([.A5]))" office:value-type="float" office:value="-0.363970234266202" calcext:value-type="float">
            <text:p>-0.363970234266202</text:p>
          </table:table-cell>
          <table:table-cell table:number-columns-repeated="2"/>
          <table:table-cell office:value-type="float" office:value="0.99896494590764" calcext:value-type="float">
            <text:p>0.99896494590764</text:p>
          </table:table-cell>
          <table:table-cell office:value-type="float" office:value="0.0358581492480611" calcext:value-type="float">
            <text:p>0.0358581492480611</text:p>
          </table:table-cell>
          <table:table-cell table:number-columns-repeated="8"/>
          <table:table-cell office:value-type="float" office:value="-0.09" calcext:value-type="float">
            <text:p>-0.09</text:p>
          </table:table-cell>
          <table:table-cell office:value-type="float" office:value="-0.363970234266202" calcext:value-type="float">
            <text:p>-0.36397023426620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TAN(RADIANS([.A6]))" office:value-type="float" office:value="0" calcext:value-type="float">
            <text:p>0</text:p>
          </table:table-cell>
          <table:table-cell table:number-columns-repeated="2"/>
          <table:table-cell office:value-type="float" office:value="8686.19773549442" calcext:value-type="float">
            <text:p>8686.1977354944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matrix-columns-spanned="2" table:number-matrix-rows-spanned="5" table:formula="of:=LINEST([.Q1:.Q11];[.P1:.P11]; 1; 1)" office:value-type="float" office:value="3.71543502809051" calcext:value-type="float">
            <text:p>3.71543502809051</text:p>
          </table:table-cell>
          <table:table-cell office:value-type="float" office:value="-0.00337766820735501" calcext:value-type="float">
            <text:p>-0.003377668207355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table:formula="of:=TAN(RADIANS([.A7]))" office:value-type="float" office:value="0.363970234266202" calcext:value-type="float">
            <text:p>0.363970234266202</text:p>
          </table:table-cell>
          <table:table-cell table:number-columns-repeated="2"/>
          <table:table-cell office:value-type="float" office:value="11.1687727007289" calcext:value-type="float">
            <text:p>11.1687727007289</text:p>
          </table:table-cell>
          <table:table-cell office:value-type="float" office:value="0.011572261807466" calcext:value-type="float">
            <text:p>0.011572261807466</text:p>
          </table:table-cell>
          <table:table-cell table:number-columns-repeated="8"/>
          <table:table-cell office:value-type="float" office:value="0.08" calcext:value-type="float">
            <text:p>0.08</text:p>
          </table:table-cell>
          <table:table-cell office:value-type="float" office:value="0.363970234266202" calcext:value-type="float">
            <text:p>0.363970234266202</text:p>
          </table:table-cell>
          <table:table-cell table:number-columns-repeated="2"/>
          <table:table-cell office:value-type="float" office:value="0.051855995916099" calcext:value-type="float">
            <text:p>0.051855995916099</text:p>
          </table:table-cell>
          <table:table-cell office:value-type="float" office:value="0.0140586186008836" calcext:value-type="float">
            <text:p>0.01405861860088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table:formula="of:=TAN(RADIANS([.A8]))" office:value-type="float" office:value="0.577350269189626" calcext:value-type="float">
            <text:p>0.577350269189626</text:p>
          </table:table-cell>
          <table:table-cell table:number-columns-repeated="12"/>
          <table:table-cell office:value-type="float" office:value="0.14" calcext:value-type="float">
            <text:p>0.14</text:p>
          </table:table-cell>
          <table:table-cell office:value-type="float" office:value="0.577350269189626" calcext:value-type="float">
            <text:p>0.577350269189626</text:p>
          </table:table-cell>
          <table:table-cell table:number-columns-repeated="2"/>
          <table:table-cell office:value-type="float" office:value="0.998249909909543" calcext:value-type="float">
            <text:p>0.998249909909543</text:p>
          </table:table-cell>
          <table:table-cell office:value-type="float" office:value="0.0466269008272995" calcext:value-type="float">
            <text:p>0.04662690082729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7" calcext:value-type="float">
            <text:p>1.17</text:p>
          </table:table-cell>
          <table:table-cell table:formula="of:=TAN(RADIANS([.A9]))" office:value-type="float" office:value="0.83909963117728" calcext:value-type="float">
            <text:p>0.83909963117728</text:p>
          </table:table-cell>
          <table:table-cell table:number-columns-repeated="12"/>
          <table:table-cell office:value-type="float" office:value="0.24" calcext:value-type="float">
            <text:p>0.24</text:p>
          </table:table-cell>
          <table:table-cell office:value-type="float" office:value="0.83909963117728" calcext:value-type="float">
            <text:p>0.83909963117728</text:p>
          </table:table-cell>
          <table:table-cell table:number-columns-repeated="2"/>
          <table:table-cell office:value-type="float" office:value="5133.59240085643" calcext:value-type="float">
            <text:p>5133.592400856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76" calcext:value-type="float">
            <text:p>1.76</text:p>
          </table:table-cell>
          <table:table-cell table:formula="of:=TAN(RADIANS([.A10]))" office:value-type="float" office:value="1.19175359259421" calcext:value-type="float">
            <text:p>1.19175359259421</text:p>
          </table:table-cell>
          <table:table-cell table:number-columns-repeated="12"/>
          <table:table-cell office:value-type="float" office:value="0.32" calcext:value-type="float">
            <text:p>0.32</text:p>
          </table:table-cell>
          <table:table-cell office:value-type="float" office:value="1.19175359259421" calcext:value-type="float">
            <text:p>1.19175359259421</text:p>
          </table:table-cell>
          <table:table-cell table:number-columns-repeated="2"/>
          <table:table-cell office:value-type="float" office:value="11.1607783516095" calcext:value-type="float">
            <text:p>11.1607783516095</text:p>
          </table:table-cell>
          <table:table-cell office:value-type="float" office:value="0.0195666109268294" calcext:value-type="float">
            <text:p>0.01956661092682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43" calcext:value-type="float">
            <text:p>2.43</text:p>
          </table:table-cell>
          <table:table-cell table:formula="of:=TAN(RADIANS([.A11]))" office:value-type="float" office:value="1.73205080756888" calcext:value-type="float">
            <text:p>1.73205080756888</text:p>
          </table:table-cell>
          <table:table-cell table:number-columns-repeated="12"/>
          <table:table-cell office:value-type="float" office:value="0.47" calcext:value-type="float">
            <text:p>0.47</text:p>
          </table:table-cell>
          <table:table-cell office:value-type="float" office:value="1.73205080756888" calcext:value-type="float">
            <text:p>1.732050807568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14:00:55.199632000</meta:creation-date>
    <dc:date>2025-09-13T23:41:17.343810500</dc:date>
    <meta:editing-duration>PT8H24M17S</meta:editing-duration>
    <meta:editing-cycles>10</meta:editing-cycles>
    <meta:generator>LibreOffice/25.2.5.2$Windows_X86_64 LibreOffice_project/03d19516eb2e1dd5d4ccd751a0d6f35f35e08022</meta:generator>
    <meta:document-statistic meta:table-count="2" meta:cell-count="193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1.583cm" svg:height="13.182cm" xlink:href=".." xlink:type="simple" chart:class="chart:scatter" chart:style-name="ch1">
        <chart:plot-area chart:style-name="ch2" svg:x="1.454cm" svg:y="0.263cm" svg:width="19.698cm" svg:height="11.663cm">
          <chart:coordinate-region svg:x="1.764cm" svg:y="0.465cm" svg:width="19.136cm" svg:height="11.259cm"/>
          <chart:axis chart:dimension="x" chart:name="primary-x" chart:style-name="ch3">
            <chart:title svg:x="10.185cm" svg:y="12.189cm" chart:style-name="ch4">
              <text:p><text:span text:style-name="T1">אורך תיל (מטר)</text:span></text:p>
            </chart:title>
          </chart:axis>
          <chart:axis chart:dimension="y" chart:name="primary-y" chart:style-name="ch5">
            <chart:title svg:x="0.451cm" svg:y="6.876cm" chart:style-name="ch6">
              <text:p><text:span text:style-name="T1">כוח (ניוטון)</text:span></text:p>
            </chart:title>
            <chart:grid chart:style-name="ch7" chart:class="major"/>
          </chart:axis>
          <chart:series chart:style-name="ch8" chart:values-cell-range-address="Sheet1.D1:Sheet1.D12" chart:class="chart:scatter">
            <chart:domain table:cell-range-address="Sheet1.I1:Sheet1.I12"/>
            <chart:regression-curve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">
                <text:p>0.012</text:p>
                <draw:g>
                  <svg:desc>Sheet1.I1:Sheet1.I12</svg:desc>
                </draw:g>
              </table:table-cell>
              <table:table-cell office:value-type="float" office:value="0.002943">
                <text:p>0.002943</text:p>
                <draw:g>
                  <svg:desc>Sheet1.D1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">
                <text:p>0.022</text:p>
              </table:table-cell>
              <table:table-cell office:value-type="float" office:value="0.0057879">
                <text:p>0.0057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">
                <text:p>0.032</text:p>
              </table:table-cell>
              <table:table-cell office:value-type="float" office:value="0.0085347">
                <text:p>0.0085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">
                <text:p>0.042</text:p>
              </table:table-cell>
              <table:table-cell office:value-type="float" office:value="0.0111834">
                <text:p>0.0111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">
                <text:p>0.064</text:p>
              </table:table-cell>
              <table:table-cell office:value-type="float" office:value="0.0161865">
                <text:p>0.0161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">
                <text:p>0.084</text:p>
              </table:table-cell>
              <table:table-cell office:value-type="float" office:value="0.0211896">
                <text:p>0.0211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2">
                <text:p>-0.012</text:p>
              </table:table-cell>
              <table:table-cell office:value-type="float" office:value="-0.0031392">
                <text:p>-0.003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2">
                <text:p>-0.022</text:p>
              </table:table-cell>
              <table:table-cell office:value-type="float" office:value="-0.005886">
                <text:p>-0.005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2">
                <text:p>-0.032</text:p>
              </table:table-cell>
              <table:table-cell office:value-type="float" office:value="-0.0086328">
                <text:p>-0.0086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42">
                <text:p>-0.042</text:p>
              </table:table-cell>
              <table:table-cell office:value-type="float" office:value="-0.0113796">
                <text:p>-0.0113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64">
                <text:p>-0.064</text:p>
              </table:table-cell>
              <table:table-cell office:value-type="float" office:value="-0.0162846">
                <text:p>-0.0162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84">
                <text:p>-0.084</text:p>
              </table:table-cell>
              <table:table-cell office:value-type="float" office:value="-0.0212877">
                <text:p>-0.0212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2.393cm" svg:height="12.989cm" xlink:href=".." xlink:type="simple" chart:class="chart:scatter" chart:style-name="ch1">
        <chart:plot-area chart:style-name="ch2" svg:x="1.47cm" svg:y="0.259cm" svg:width="20.476cm" svg:height="11.478cm">
          <chart:coordinate-region svg:x="2.621cm" svg:y="0.461cm" svg:width="19.223cm" svg:height="10.623cm"/>
          <chart:axis chart:dimension="x" chart:name="primary-x" chart:style-name="ch3">
            <chart:title svg:x="10.862cm" svg:y="11.996cm" chart:style-name="ch4">
              <text:p><text:span text:style-name="T1">זרם (אמפר)</text:span></text:p>
            </chart:title>
          </chart:axis>
          <chart:axis chart:dimension="y" chart:name="primary-y" chart:style-name="ch5">
            <chart:title svg:x="0.451cm" svg:y="6.78cm" chart:style-name="ch6">
              <text:p><text:span text:style-name="T1">כוח (ניוטון)</text:span></text:p>
            </chart:title>
            <chart:grid chart:style-name="ch7" chart:class="major"/>
          </chart:axis>
          <chart:series chart:style-name="ch8" chart:values-cell-range-address="Sheet1.T1:Sheet1.T8" chart:class="chart:scatter">
            <chart:domain table:cell-range-address="Sheet1.R1:Sheet1.R8"/>
            <chart:regression-curve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">
                <text:p>1.07</text:p>
                <draw:g>
                  <svg:desc>Sheet1.R1:Sheet1.R8</svg:desc>
                </draw:g>
              </table:table-cell>
              <table:table-cell office:value-type="float" office:value="0.0065727">
                <text:p>0.0065727</text:p>
                <draw:g>
                  <svg:desc>Sheet1.T1:Sheet1.T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">
                <text:p>1.61</text:p>
              </table:table-cell>
              <table:table-cell office:value-type="float" office:value="0.0099081">
                <text:p>0.0099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23606">
                <text:p>0.0123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">
                <text:p>2.53</text:p>
              </table:table-cell>
              <table:table-cell office:value-type="float" office:value="0.015696">
                <text:p>0.01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1">
                <text:p>3.11</text:p>
              </table:table-cell>
              <table:table-cell office:value-type="float" office:value="0.0192276">
                <text:p>0.0192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3">
                <text:p>3.53</text:p>
              </table:table-cell>
              <table:table-cell office:value-type="float" office:value="0.0216801">
                <text:p>0.0216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6">
                <text:p>3.96</text:p>
              </table:table-cell>
              <table:table-cell office:value-type="float" office:value="0.0242307">
                <text:p>0.0242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5">
                <text:p>4.45</text:p>
              </table:table-cell>
              <table:table-cell office:value-type="float" office:value="0.0272718">
                <text:p>0.0272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2.235cm" svg:height="13.569cm" xlink:href=".." xlink:type="simple" chart:class="chart:scatter" chart:style-name="ch1">
        <chart:plot-area chart:style-name="ch2" svg:x="1.445cm" svg:y="0.271cm" svg:width="20.346cm" svg:height="12.034cm">
          <chart:coordinate-region svg:x="1.605cm" svg:y="0.473cm" svg:width="20.084cm" svg:height="11.63cm"/>
          <chart:axis chart:dimension="x" chart:name="primary-x" chart:style-name="ch3">
            <chart:title svg:x="11.073cm" svg:y="12.576cm" chart:style-name="ch4">
              <text:p><text:span text:style-name="T1">זרם [A]</text:span></text:p>
            </chart:title>
          </chart:axis>
          <chart:axis chart:dimension="y" chart:name="primary-y" chart:style-name="ch5">
            <chart:title svg:x="0.451cm" svg:y="6.76cm" chart:style-name="ch6">
              <text:p><text:span text:style-name="T1">tan(θ)</text:span></text:p>
            </chart:title>
            <chart:grid chart:style-name="ch7" chart:class="major"/>
          </chart:axis>
          <chart:series chart:style-name="ch8" chart:values-cell-range-address="Sheet2.C1:Sheet2.C11" chart:class="chart:scatter">
            <chart:domain table:cell-range-address="Sheet2.B1:Sheet2.B11"/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65">
                <text:p>-2.65</text:p>
                <draw:g>
                  <svg:desc>Sheet2.B1:Sheet2.B11</svg:desc>
                </draw:g>
              </table:table-cell>
              <table:table-cell office:value-type="float" office:value="-1.73205080756888">
                <text:p>-1.73205080756888</text:p>
                <draw:g>
                  <svg:desc>Sheet2.C1:Sheet2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">
                <text:p>-1.84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7">
                <text:p>-1.27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8">
                <text:p>-0.88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6">
                <text:p>-0.56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">
                <text:p>0.57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6">
                <text:p>1.76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3">
                <text:p>2.43</text:p>
              </table:table-cell>
              <table:table-cell office:value-type="float" office:value="1.73205080756888">
                <text:p>1.732050807568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5.409cm" svg:height="13.204cm" xlink:href=".." xlink:type="simple" chart:class="chart:scatter" chart:style-name="ch1">
        <chart:plot-area chart:style-name="ch2" svg:x="1.509cm" svg:y="0.264cm" svg:width="23.392cm" svg:height="11.683cm">
          <chart:coordinate-region svg:x="1.819cm" svg:y="0.466cm" svg:width="22.83cm" svg:height="11.279cm"/>
          <chart:axis chart:dimension="x" chart:name="primary-x" chart:style-name="ch3">
            <chart:title svg:x="12.66cm" svg:y="12.211cm" chart:style-name="ch4">
              <text:p><text:span text:style-name="T1">זרם [A]</text:span></text:p>
            </chart:title>
          </chart:axis>
          <chart:axis chart:dimension="y" chart:name="primary-y" chart:style-name="ch5">
            <chart:title svg:x="0.451cm" svg:y="6.577cm" chart:style-name="ch6">
              <text:p><text:span text:style-name="T1">tan(θ)</text:span></text:p>
            </chart:title>
            <chart:grid chart:style-name="ch7" chart:class="major"/>
          </chart:axis>
          <chart:series chart:style-name="ch8" chart:values-cell-range-address="Sheet2.Q1:Sheet2.Q11" chart:class="chart:scatter">
            <chart:domain table:cell-range-address="Sheet2.P1:Sheet2.P11"/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7">
                <text:p>-0.47</text:p>
                <draw:g>
                  <svg:desc>Sheet2.P1:Sheet2.P11</svg:desc>
                </draw:g>
              </table:table-cell>
              <table:table-cell office:value-type="float" office:value="-1.73205080756888">
                <text:p>-1.73205080756888</text:p>
                <draw:g>
                  <svg:desc>Sheet2.Q1:Sheet2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3">
                <text:p>-0.33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">
                <text:p>-0.21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">
                <text:p>-0.14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">
                <text:p>-0.09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">
                <text:p>0.24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">
                <text:p>0.32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">
                <text:p>0.47</text:p>
              </table:table-cell>
              <table:table-cell office:value-type="float" office:value="1.73205080756888">
                <text:p>1.732050807568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